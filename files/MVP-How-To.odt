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7F000003B3824176E5.png" manifest:media-type="image/png"/>
  <manifest:file-entry manifest:full-path="Pictures/100000010000077F000003B33136F94B.png" manifest:media-type="image/png"/>
  <manifest:file-entry manifest:full-path="Pictures/100000010000007D00000078B8CBA589.png" manifest:media-type="image/png"/>
  <manifest:file-entry manifest:full-path="Pictures/1000000100000102000001747001CAA7.png" manifest:media-type="image/png"/>
  <manifest:file-entry manifest:full-path="Pictures/10000001000000B50000011728B12A25.png" manifest:media-type="image/png"/>
  <manifest:file-entry manifest:full-path="Pictures/100000010000077F000003B55CD38D7E.png" manifest:media-type="image/png"/>
  <manifest:file-entry manifest:full-path="Pictures/10000001000000B50000016BCD0CA8A6.png" manifest:media-type="image/png"/>
  <manifest:file-entry manifest:full-path="Pictures/10000001000000B50000012B818D5727.png" manifest:media-type="image/png"/>
  <manifest:file-entry manifest:full-path="Pictures/100000010000010D0000010FF7948B90.png" manifest:media-type="image/png"/>
  <manifest:file-entry manifest:full-path="Pictures/10000001000000BD000000D424CDF8D9.png" manifest:media-type="image/png"/>
  <manifest:file-entry manifest:full-path="Pictures/100000010000077F000003AE54BF6972.png" manifest:media-type="image/png"/>
  <manifest:file-entry manifest:full-path="Pictures/1000000100000249000000F01D64C618.png" manifest:media-type="image/png"/>
  <manifest:file-entry manifest:full-path="Pictures/10000001000002B200000127D1A4951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4e3322" style:font-size-asian="18pt" style:font-size-complex="18pt"/>
    </style:style>
    <style:style style:name="P2" style:family="paragraph" style:parent-style-name="Standard">
      <style:text-properties fo:font-size="18pt" officeooo:rsid="004e3322" officeooo:paragraph-rsid="004e3322" style:font-size-asian="18pt" style:font-size-complex="18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>
      <loext:graphic-properties draw:fill-color="#3465a4"/>
      <style:paragraph-properties fo:text-align="center" style:writing-mode="lr-tb"/>
    </style:style>
    <style:style style:name="P5" style:family="paragraph" style:parent-style-name="Standard">
      <style:text-properties fo:font-size="18pt" officeooo:paragraph-rsid="00066d85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-color="#5983b0"/>
      <style:text-properties fo:font-size="12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loext:graphic-properties draw:fill-color="#3465a4"/>
      <style:paragraph-properties fo:text-align="center" style:writing-mode="lr-tb"/>
      <style:text-properties fo:font-size="22pt" style:font-size-asian="22pt" style:font-size-complex="22pt"/>
    </style:style>
    <style:style style:name="P12" style:family="paragraph" style:parent-style-name="Standard">
      <style:text-properties fo:font-size="18pt" officeooo:rsid="0028d5c3" officeooo:paragraph-rsid="0028d5c3" style:font-size-asian="18pt" style:font-size-complex="18pt"/>
    </style:style>
    <style:style style:name="P13" style:family="paragraph" style:parent-style-name="Standard">
      <style:text-properties fo:font-size="18pt" officeooo:paragraph-rsid="0035ba6d" style:font-size-asian="18pt" style:font-size-complex="18pt"/>
    </style:style>
    <style:style style:name="P14" style:family="paragraph" style:parent-style-name="Standard">
      <style:text-properties fo:font-size="18pt" officeooo:rsid="00066d85" officeooo:paragraph-rsid="00066d85" style:font-size-asian="18pt" style:font-size-complex="18pt"/>
    </style:style>
    <style:style style:name="P15" style:family="paragraph" style:parent-style-name="Standard">
      <style:paragraph-properties fo:text-align="left" style:justify-single-word="false"/>
      <style:text-properties fo:font-size="18pt" officeooo:rsid="00363980" officeooo:paragraph-rsid="004e4d88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officeooo:rsid="0035ba6d" officeooo:paragraph-rsid="004fbbe9" style:font-size-asian="18pt" style:font-size-complex="18pt"/>
    </style:style>
    <style:style style:name="P17" style:family="paragraph" style:parent-style-name="Standard">
      <style:paragraph-properties fo:text-align="left" style:justify-single-word="false"/>
      <style:text-properties fo:font-size="18pt" officeooo:rsid="0035ba6d" officeooo:paragraph-rsid="004e4d88" style:font-size-asian="18pt" style:font-size-complex="18pt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12pt"/>
    </style:style>
    <style:style style:name="P21" style:family="paragraph" style:parent-style-name="Standard">
      <style:text-properties fo:font-size="18pt" officeooo:rsid="0035ba6d" officeooo:paragraph-rsid="0035ba6d" style:font-size-asian="18pt" style:font-size-complex="18pt"/>
    </style:style>
    <style:style style:name="P22" style:family="paragraph" style:parent-style-name="Standard">
      <style:text-properties fo:font-size="18pt" officeooo:rsid="0021bc97" officeooo:paragraph-rsid="00066d85" style:font-size-asian="18pt" style:font-size-complex="18pt"/>
    </style:style>
    <style:style style:name="P23" style:family="paragraph" style:parent-style-name="Standard">
      <style:text-properties fo:font-size="18pt" officeooo:rsid="00099900" officeooo:paragraph-rsid="00099900" style:font-size-asian="18pt" style:font-size-complex="18pt"/>
    </style:style>
    <style:style style:name="P24" style:family="paragraph">
      <style:text-properties fo:background-color="#ff5429"/>
    </style:style>
    <style:style style:name="P25" style:family="paragraph">
      <loext:graphic-properties draw:fill="none" draw:fill-color="#ffffff"/>
      <style:text-properties fo:background-color="#ff5429"/>
    </style:style>
    <style:style style:name="P26" style:family="paragraph" style:parent-style-name="Standard">
      <style:text-properties fo:font-size="18pt" officeooo:rsid="00099900" officeooo:paragraph-rsid="0032e9c0" style:font-size-asian="18pt" style:font-size-complex="18pt"/>
    </style:style>
    <style:style style:name="P27" style:family="paragraph" style:parent-style-name="Standard">
      <style:text-properties fo:font-size="18pt" officeooo:rsid="0023feda" officeooo:paragraph-rsid="0032e9c0" style:font-size-asian="18pt" style:font-size-complex="18pt"/>
    </style:style>
    <style:style style:name="P28" style:family="paragraph" style:parent-style-name="Standard">
      <style:text-properties fo:font-size="18pt" officeooo:rsid="00248fa5" officeooo:paragraph-rsid="0032e9c0" style:font-size-asian="18pt" style:font-size-complex="18pt"/>
    </style:style>
    <style:style style:name="P29" style:family="paragraph" style:parent-style-name="Standard">
      <style:paragraph-properties fo:text-align="center" style:justify-single-word="false"/>
      <style:text-properties fo:font-size="18pt" officeooo:rsid="00099900" officeooo:paragraph-rsid="00099900" style:font-size-asian="18pt" style:font-size-complex="18pt"/>
    </style:style>
    <style:style style:name="P30" style:family="paragraph" style:parent-style-name="Standard">
      <style:text-properties fo:font-size="18pt" officeooo:rsid="00363980" officeooo:paragraph-rsid="00363980" style:font-size-asian="18pt" style:font-size-complex="18pt"/>
    </style:style>
    <style:style style:name="P31" style:family="paragraph" style:parent-style-name="Standard">
      <style:text-properties fo:font-size="18pt" officeooo:rsid="0037a79a" officeooo:paragraph-rsid="0037a79a" style:font-size-asian="18pt" style:font-size-complex="18pt"/>
    </style:style>
    <style:style style:name="P32" style:family="paragraph">
      <loext:graphic-properties draw:fill-color="#ffffff"/>
    </style:style>
    <style:style style:name="P33" style:family="paragraph" style:parent-style-name="Standard">
      <style:text-properties fo:font-size="18pt" officeooo:rsid="0038be35" officeooo:paragraph-rsid="0038be35" style:font-size-asian="18pt" style:font-size-complex="18pt"/>
    </style:style>
    <style:style style:name="P34" style:family="paragraph" style:parent-style-name="Standard">
      <style:text-properties fo:font-size="18pt" officeooo:paragraph-rsid="0051db33" style:font-size-asian="18pt" style:font-size-complex="18pt"/>
    </style:style>
    <style:style style:name="P35" style:family="paragraph" style:parent-style-name="Standard">
      <style:text-properties fo:font-size="18pt" officeooo:rsid="0015c0a0" officeooo:paragraph-rsid="0051db33" style:font-size-asian="18pt" style:font-size-complex="18pt"/>
    </style:style>
    <style:style style:name="P36" style:family="paragraph" style:parent-style-name="Standard">
      <style:text-properties fo:font-size="18pt" officeooo:rsid="00099900" officeooo:paragraph-rsid="0051db33" style:font-size-asian="18pt" style:font-size-complex="18pt"/>
    </style:style>
    <style:style style:name="P37" style:family="paragraph">
      <style:paragraph-properties fo:text-align="center"/>
      <style:text-properties fo:font-size="12pt"/>
    </style:style>
    <style:style style:name="P38" style:family="paragraph">
      <loext:graphic-properties draw:fill-color="#3465a4"/>
      <style:paragraph-properties fo:text-align="center" style:writing-mode="lr-tb"/>
      <style:text-properties fo:font-size="12pt"/>
    </style:style>
    <style:style style:name="P39" style:family="paragraph" style:parent-style-name="Standard">
      <style:text-properties fo:font-size="18pt" officeooo:rsid="00099900" officeooo:paragraph-rsid="004c0278" style:font-size-asian="18pt" style:font-size-complex="18pt"/>
    </style:style>
    <style:style style:name="P40" style:family="paragraph">
      <style:text-properties style:font-name="Liberation Serif" fo:font-size="18pt" style:font-size-asian="18pt" style:font-size-complex="18pt"/>
    </style:style>
    <style:style style:name="P41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42" style:family="paragraph" style:parent-style-name="Standard">
      <style:text-properties fo:font-size="18pt" officeooo:rsid="000fb58d" officeooo:paragraph-rsid="0051db33" style:font-size-asian="18pt" style:font-size-complex="18pt"/>
    </style:style>
    <style:style style:name="P43" style:family="paragraph" style:parent-style-name="Standard">
      <style:text-properties fo:font-size="18pt" officeooo:rsid="0015e93e" officeooo:paragraph-rsid="003a70b3" style:font-size-asian="18pt" style:font-size-complex="18pt"/>
    </style:style>
    <style:style style:name="P44" style:family="paragraph" style:parent-style-name="Standard">
      <style:text-properties fo:font-size="18pt" officeooo:rsid="0015e93e" officeooo:paragraph-rsid="003ca853" style:font-size-asian="18pt" style:font-size-complex="18pt"/>
    </style:style>
    <style:style style:name="P45" style:family="paragraph" style:parent-style-name="Standard">
      <style:text-properties fo:font-size="18pt" officeooo:paragraph-rsid="003ca853" style:font-size-asian="18pt" style:font-size-complex="18pt"/>
    </style:style>
    <style:style style:name="P46" style:family="paragraph" style:parent-style-name="Standard">
      <style:text-properties fo:font-size="18pt" officeooo:rsid="0016ebc6" officeooo:paragraph-rsid="003ca853" style:font-size-asian="18pt" style:font-size-complex="18pt"/>
    </style:style>
    <style:style style:name="P47" style:family="paragraph" style:parent-style-name="Standard">
      <style:text-properties fo:font-size="18pt" officeooo:rsid="0016ebc6" officeooo:paragraph-rsid="0041cd3d" style:font-size-asian="18pt" style:font-size-complex="18pt"/>
    </style:style>
    <style:style style:name="P48" style:family="paragraph" style:parent-style-name="Standard">
      <style:text-properties fo:font-size="18pt" officeooo:rsid="0016ebc6" officeooo:paragraph-rsid="003d349b" style:font-size-asian="18pt" style:font-size-complex="18pt"/>
    </style:style>
    <style:style style:name="P49" style:family="paragraph" style:parent-style-name="Standard">
      <style:text-properties fo:font-size="18pt" officeooo:paragraph-rsid="003d349b" style:font-size-asian="18pt" style:font-size-complex="18pt"/>
    </style:style>
    <style:style style:name="P50" style:family="paragraph" style:parent-style-name="Standard">
      <style:text-properties fo:font-size="18pt" officeooo:rsid="00432451" officeooo:paragraph-rsid="00432451" style:font-size-asian="18pt" style:font-size-complex="18pt"/>
    </style:style>
    <style:style style:name="P51" style:family="paragraph" style:parent-style-name="Standard">
      <style:text-properties fo:font-size="18pt" officeooo:rsid="0015c0a0" officeooo:paragraph-rsid="004c0278" style:font-size-asian="18pt" style:font-size-complex="18pt"/>
    </style:style>
    <style:style style:name="T1" style:family="text">
      <style:text-properties officeooo:rsid="0032e9c0"/>
    </style:style>
    <style:style style:name="T2" style:family="text">
      <style:text-properties officeooo:rsid="0050b0dd"/>
    </style:style>
    <style:style style:name="T3" style:family="text">
      <style:text-properties officeooo:rsid="0036a2ca"/>
    </style:style>
    <style:style style:name="T4" style:family="text">
      <style:text-properties officeooo:rsid="00066d85"/>
    </style:style>
    <style:style style:name="T5" style:family="text">
      <style:text-properties officeooo:rsid="002c4160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officeooo:rsid="00350917"/>
    </style:style>
    <style:style style:name="T8" style:family="text">
      <style:text-properties officeooo:rsid="004e4d88"/>
    </style:style>
    <style:style style:name="T9" style:family="text">
      <style:text-properties officeooo:rsid="0007c57b"/>
    </style:style>
    <style:style style:name="T10" style:family="text">
      <style:text-properties officeooo:rsid="0021bc97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style:font-size-asian="15pt" style:font-size-complex="18pt"/>
    </style:style>
    <style:style style:name="T13" style:family="text">
      <style:text-properties fo:font-size="22pt" fo:background-color="#ff5429" style:font-size-asian="20pt" style:font-size-complex="22pt"/>
    </style:style>
    <style:style style:name="T14" style:family="text">
      <style:text-properties officeooo:rsid="00363980" fo:background-color="#ff5429" loext:char-shading-value="0"/>
    </style:style>
    <style:style style:name="T15" style:family="text">
      <style:text-properties officeooo:rsid="00363980"/>
    </style:style>
    <style:style style:name="T16" style:family="text">
      <style:text-properties officeooo:rsid="0023feda"/>
    </style:style>
    <style:style style:name="T17" style:family="text">
      <style:text-properties officeooo:rsid="0023794e"/>
    </style:style>
    <style:style style:name="T18" style:family="text">
      <style:text-properties officeooo:rsid="004fbbe9"/>
    </style:style>
    <style:style style:name="T19" style:family="text">
      <style:text-properties officeooo:rsid="0026ef0a"/>
    </style:style>
    <style:style style:name="T20" style:family="text">
      <style:text-properties officeooo:rsid="00282a84"/>
    </style:style>
    <style:style style:name="T21" style:family="text">
      <style:text-properties officeooo:rsid="00307c47"/>
    </style:style>
    <style:style style:name="T22" style:family="text">
      <style:text-properties officeooo:rsid="00284157"/>
    </style:style>
    <style:style style:name="T23" style:family="text">
      <style:text-properties fo:font-size="22pt" style:font-size-asian="20pt" style:font-size-complex="22pt"/>
    </style:style>
    <style:style style:name="T24" style:family="text">
      <style:text-properties officeooo:rsid="0037a79a" fo:background-color="#ff5429" loext:char-shading-value="0"/>
    </style:style>
    <style:style style:name="T25" style:family="text">
      <style:text-properties officeooo:rsid="0037a79a"/>
    </style:style>
    <style:style style:name="T26" style:family="text">
      <style:text-properties officeooo:rsid="00099900"/>
    </style:style>
    <style:style style:name="T27" style:family="text">
      <style:text-properties fo:background-color="#ff5429" loext:char-shading-value="0"/>
    </style:style>
    <style:style style:name="T28" style:family="text">
      <style:text-properties officeooo:rsid="003810eb"/>
    </style:style>
    <style:style style:name="T29" style:family="text">
      <style:text-properties officeooo:rsid="004c0278"/>
    </style:style>
    <style:style style:name="T30" style:family="text">
      <style:text-properties officeooo:rsid="00102961"/>
    </style:style>
    <style:style style:name="T31" style:family="text">
      <style:text-properties officeooo:rsid="0051db33"/>
    </style:style>
    <style:style style:name="T32" style:family="text">
      <style:text-properties style:font-name="Liberation Serif" fo:font-size="18pt" style:font-size-asian="18pt" style:font-size-complex="18pt"/>
    </style:style>
    <style:style style:name="T33" style:family="text">
      <style:text-properties officeooo:rsid="003ae8d6" fo:background-color="#ff5429" loext:char-shading-value="0"/>
    </style:style>
    <style:style style:name="T34" style:family="text">
      <style:text-properties officeooo:rsid="003ae8d6"/>
    </style:style>
    <style:style style:name="T35" style:family="text">
      <style:text-properties officeooo:rsid="0016ebc6"/>
    </style:style>
    <style:style style:name="T36" style:family="text">
      <style:text-properties officeooo:rsid="003ca853"/>
    </style:style>
    <style:style style:name="T37" style:family="text">
      <style:text-properties officeooo:rsid="0041cd3d"/>
    </style:style>
    <style:style style:name="T38" style:family="text">
      <style:text-properties officeooo:rsid="0054174f"/>
    </style:style>
    <style:style style:name="T39" style:family="text">
      <style:text-properties officeooo:rsid="0055795c"/>
    </style:style>
    <style:style style:name="T40" style:family="text">
      <style:text-properties officeooo:rsid="0055fdd0"/>
    </style:style>
    <style:style style:name="T41" style:family="text">
      <style:text-properties officeooo:rsid="003d349b" fo:background-color="#ff5429" loext:char-shading-value="0"/>
    </style:style>
    <style:style style:name="T42" style:family="text">
      <style:text-properties officeooo:rsid="003d349b"/>
    </style:style>
    <style:style style:name="T43" style:family="text">
      <style:text-properties officeooo:rsid="001ec443"/>
    </style:style>
    <style:style style:name="T44" style:family="text">
      <style:text-properties officeooo:rsid="0049259b"/>
    </style:style>
    <style:style style:name="T45" style:family="text">
      <style:text-properties officeooo:rsid="00464c3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2598in, 14.2661in, -0.00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068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3465a4" draw:textarea-horizontal-align="justify" draw:textarea-vertical-align="middle" draw:auto-grow-height="false" fo:min-height="11.752in" fo:min-width="0.295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ff0000" draw:marker-start="Arrowheads_20_1" draw:marker-start-width="0.1291in" draw:marker-end-width="0.1984in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02in" svg:stroke-color="#ff0000" draw:marker-start-width="0.1984in" draw:marker-end-width="0.1984in" draw:fill="none" draw:textarea-horizontal-align="justify" draw:textarea-vertical-align="middle" draw:auto-grow-height="false" fo:min-height="0.6673in" fo:min-width="0.2339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729fcf" draw:fill-color="#5983b0" draw:textarea-horizontal-align="justify" draw:textarea-vertical-align="middle" draw:auto-grow-height="false" fo:min-height="0.3138in" fo:min-width="0.35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3465a4" draw:textarea-horizontal-align="justify" draw:textarea-vertical-align="middle" draw:auto-grow-height="false" fo:min-height="0.5673in" fo:min-width="2.5925in" style:writing-mode="lr-tb" loext:decorative="false" style:run-through="foreground" style:wrap="run-through" style:number-wrapped-paragraphs="no-limit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402in" svg:stroke-color="#ff0000" draw:marker-start-width="0.1984in" draw:marker-end-width="0.1984in" draw:fill="none" draw:textarea-horizontal-align="justify" draw:textarea-vertical-align="middle" draw:auto-grow-height="false" fo:min-height="0.648in" fo:min-width="0.7528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none" draw:fill-color="#ffffff" fo:min-height="0.378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draw:fill="none" draw:fill-color="#ffffff" fo:min-height="0.336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draw:fill="none" draw:fill-color="#ffffff" fo:min-height="0.863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width="0.0402in" svg:stroke-color="#ff0000" draw:marker-start-width="0.1984in" draw:marker-end-width="0.1984in" draw:fill="none" draw:textarea-horizontal-align="justify" draw:textarea-vertical-align="middle" draw:auto-grow-height="false" fo:min-height="1.6075in" fo:min-width="1.2244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402in" svg:stroke-color="#ff0000" draw:marker-start-width="0.1984in" draw:marker-end-width="0.1984in" draw:fill="none" draw:textarea-horizontal-align="justify" draw:textarea-vertical-align="middle" draw:auto-grow-height="false" fo:min-height="1.8854in" fo:min-width="0.7528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402in" svg:stroke-color="#ff0000" draw:marker-start-width="0.1984in" draw:marker-end-width="0.1984in" draw:fill="none" draw:fill-color="#ffffff" draw:textarea-horizontal-align="justify" draw:textarea-vertical-align="middle" draw:auto-grow-height="false" fo:min-height="0.411in" fo:min-width="0.5047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3465a4" draw:textarea-horizontal-align="justify" draw:textarea-vertical-align="middle" draw:auto-grow-height="false" fo:min-height="0.5673in" fo:min-width="2.5925in" style:writing-mode="lr-tb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none" draw:fill-color="#ffffff" fo:min-height="0.430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0402in" svg:stroke-color="#ff0000" draw:marker-start-width="0.1984in" draw:marker-end-width="0.1984in" draw:fill="none" draw:fill-color="#ffffff" draw:textarea-horizontal-align="justify" draw:textarea-vertical-align="middle" draw:auto-grow-height="false" fo:min-height="0.5807in" fo:min-width="4.872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ffffff" draw:textarea-horizontal-align="justify" draw:textarea-vertical-align="middle" draw:auto-grow-height="false" fo:min-height="2.9063in" fo:min-width="3.4272in" loext:decorative="fals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draw:fill="none" draw:fill-color="#ffffff" fo:min-height="0.604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svg:stroke-color="#ffffff" draw:fill-color="#ffffff" draw:textarea-horizontal-align="justify" draw:textarea-vertical-align="middle" draw:auto-grow-height="false" fo:min-height="2.8902in" fo:min-width="0.6146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ffffff" draw:fill-color="#ffffff" draw:textarea-horizontal-align="justify" draw:textarea-vertical-align="middle" draw:auto-grow-height="false" fo:min-height="0.2098in" fo:min-width="3.3335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3465a4" draw:textarea-horizontal-align="justify" draw:textarea-vertical-align="middle" draw:auto-grow-height="false" fo:min-height="0.5681in" fo:min-width="2.5929in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none" draw:fill-color="#ffffff" fo:min-height="2.872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fill-color="#3465a4" draw:textarea-horizontal-align="justify" draw:textarea-vertical-align="middle" draw:auto-grow-height="false" fo:min-height="0.5673in" fo:min-width="2.5925in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.0402in" svg:stroke-color="#ff0000" draw:marker-start-width="0.1984in" draw:marker-end-width="0.1984in" draw:fill="none" draw:textarea-horizontal-align="justify" draw:textarea-vertical-align="middle" draw:auto-grow-height="false" fo:min-height="0.4299in" fo:min-width="0.8882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 and welcome to MVP Connect. Here we will outline how to use your app.</text:p>
      <text:p text:style-name="P1"/>
      <text:p text:style-name="P1"><text:span text:style-name="T1">During use, </text:span><text:span text:style-name="T2">l</text:span><text:span text:style-name="T1">ong press on buttons to </text:span><text:span text:style-name="T3">open</text:span><text:span text:style-name="T1"> a tip holder.</text:span></text:p>
      <text:p text:style-name="P2">This app will function on any device that has a browser. To use MVP Connect like an app, follow the install instructions on the webpage. This is create a shortcut on your device and when opened, the app will act like an app in full screen mode. It is not installed like an app, it creates a link to the browser. </text:p>
      <text:p text:style-name="P3"/>
      <text:p text:style-name="P3"><draw:custom-shape text:anchor-type="paragraph" draw:z-index="64" draw:name="Shape 10" draw:style-name="gr1" draw:text-style-name="P4" svg:width="0.2953in" svg:height="11.7524in" svg:x="-0.4945in" svg:y="1.1083in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5"><text:span text:style-name="T4">On first load, there are no albums or images loaded. <text:s/>You have a clean slate to start building </text:span><text:span text:style-name="T5">albums</text:span><text:span text:style-name="T4">.</text:span></text:p>
      <text:p text:style-name="P5"/>
      <text:p text:style-name="P2">Long-press in the top-left corner to change modes (Play / Editor)</text:p>
      <text:p text:style-name="P2"/>
      <text:p text:style-name="P3"><draw:line text:anchor-type="paragraph" draw:z-index="13" draw:name="Line 14" draw:style-name="gr2" draw:text-style-name="P6" svg:x1="6.6626in" svg:y1="1.5642in" svg:x2="6.5417in" svg:y2="1.5642in"><text:p/></draw:line><draw:line text:anchor-type="paragraph" draw:z-index="12" draw:name="Line 13" draw:style-name="gr2" draw:text-style-name="P6" svg:x1="0.4945in" svg:y1="1.6071in" svg:x2="0.6362in" svg:y2="1.6071in"><text:p/></draw:line><draw:custom-shape text:anchor-type="paragraph" draw:z-index="11" draw:name="Shape 24" draw:style-name="gr3" draw:text-style-name="P7" svg:width="0.2732in" svg:height="0.7067in" svg:x="0.4402in" svg:y="1.2492in"><text:p/><draw:enhanced-geometry svg:viewBox="0 0 21600 21600" draw:type="rectangle" draw:enhanced-path="M 0 0 L 21600 0 21600 21600 0 21600 0 0 Z N"/></draw:custom-shape><draw:custom-shape text:anchor-type="paragraph" draw:z-index="10" draw:name="Shape 23" draw:style-name="gr3" draw:text-style-name="P7" svg:width="0.2732in" svg:height="0.7067in" svg:x="6.4563in" svg:y="1.2307in"><text:p/><draw:enhanced-geometry svg:viewBox="0 0 21600 21600" draw:type="rectangle" draw:enhanced-path="M 0 0 L 21600 0 21600 21600 0 21600 0 0 Z N"/></draw:custom-shape><draw:custom-shape text:anchor-type="paragraph" draw:z-index="2" draw:name="Shape 1" draw:style-name="gr4" draw:text-style-name="P8" svg:width="0.5079in" svg:height="0.4433in" svg:x="0.4929in" svg:y="0.21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y="0.1425in" svg:width="6.3874in" svg:height="3.152in" draw:z-index="1"><draw:image xlink:href="Pictures/100000010000077F000003B33136F94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9"><draw:custom-shape text:anchor-type="paragraph" draw:z-index="17" draw:name="Shape 27" draw:style-name="gr5" draw:text-style-name="P11" svg:width="2.5925in" svg:height="0.5677in" svg:x="2.3374in" svg:y="0in"><text:p text:style-name="P10"><text:span text:style-name="T6">- Modes -</text:span></text:p><draw:enhanced-geometry svg:viewBox="0 0 21600 21600" draw:type="rectangle" draw:enhanced-path="M 0 0 L 21600 0 21600 21600 0 21600 0 0 Z N"/></draw:custom-shape><text:soft-page-break/></text:p>
      <text:p text:style-name="P9"/>
      <text:p text:style-name="P9"/>
      <text:p text:style-name="P12">There are two modes, Play mode and Editor mode.</text:p>
      <text:p text:style-name="P12"/>
      <text:p text:style-name="P12">The default mode is Play mode. Users can click on the far-left and far-right of the screen <text:span text:style-name="T7">or select the thumbnails </text:span>to cycle between pages <text:span text:style-name="T8">(images)</text:span>. Users can also click on items, play audio clips, and scratch images.</text:p>
      <text:p text:style-name="P9"/>
      <text:p text:style-name="P13"><text:span text:style-name="T4">To enter ‘</text:span><text:span text:style-name="T9">E</text:span><text:span text:style-name="T4">ditor’ mode, long-press in the top-left corner for about 3 seconds. </text:span><text:span text:style-name="T9">Likewise, to enter ‘Play’ mode, hold for about 3 seconds in the same position.</text:span></text:p>
      <text:p text:style-name="P9"/>
      <text:p text:style-name="P12">Editor mode is where the magic takes place. This mode is not for students, patients, or users who should not have access.</text:p>
      <text:p text:style-name="P5"><draw:custom-shape text:anchor-type="paragraph" draw:z-index="63" draw:name="Shape 8" draw:style-name="gr1" draw:text-style-name="P4" svg:width="0.2953in" svg:height="11.7524in" svg:x="-0.4945in" svg:y="1.1083in"><text:p/><draw:enhanced-geometry svg:viewBox="0 0 21600 21600" draw:type="rectangle" draw:enhanced-path="M 0 0 L 21600 0 21600 21600 0 21600 0 0 Z N"/></draw:custom-shape><text:span text:style-name="T10">In the ‘Editor’ mode</text:span><text:span text:style-name="T4">, you’ll notice a toolbar on the right-hand side and a button to toggle the toolbar on/off. </text:span><text:span text:style-name="T9">This can be handy when using mobile devices with smaller screens.</text:span></text:p>
      <text:p text:style-name="P14"/>
      <text:p text:style-name="P15">Indicates draw mode, play page audio button, play frames button.</text:p>
      <text:p text:style-name="P16"><draw:line text:anchor-type="paragraph" draw:z-index="25" draw:name="Line 16" draw:style-name="gr2" draw:text-style-name="P6" svg:x1="5.9126in" svg:y1="0.4169in" svg:x2="5.0717in" svg:y2="0.0307in"><text:p/></draw:line><draw:custom-shape text:anchor-type="paragraph" draw:z-index="24" draw:name="Shape 29" draw:style-name="gr6" draw:text-style-name="P7" svg:width="0.7921in" svg:height="0.687in" svg:x="5.9126in" svg:y="0.0299in"><text:p/><draw:enhanced-geometry svg:viewBox="0 0 21600 21600" draw:mirror-vertical="true" draw:type="rectangle" draw:enhanced-path="M 0 0 L 21600 0 21600 21600 0 21600 0 0 Z N"/></draw:custom-shape><draw:frame draw:style-name="fr2" draw:name="Image24" text:anchor-type="char" svg:x="6.0189in" svg:y="0.0717in" svg:width="0.6075in" svg:height="0.5835in" draw:z-index="23"><draw:image xlink:href="Pictures/100000010000007D00000078B8CBA589.png" xlink:type="simple" xlink:show="embed" xlink:actuate="onLoad" draw:mime-type="image/png"/></draw:frame></text:p>
      <text:p text:style-name="P17"><draw:frame text:anchor-type="paragraph" draw:z-index="68" draw:name="Text Frame 22" draw:style-name="gr7" draw:text-style-name="P18" svg:width="1.6913in" svg:height="0.3787in" svg:x="0.589in" svg:y="0.4874in"><draw:text-box><text:p><text:span text:style-name="T11">Tag inspector</text:span></text:p></draw:text-box></draw:frame><draw:frame text:anchor-type="paragraph" draw:z-index="67" draw:name="Text Frame 21" draw:style-name="gr8" draw:text-style-name="P19" svg:width="1.2539in" svg:height="0.337in" svg:x="3.9016in" svg:y="1.9736in"><draw:text-box><text:p><text:span text:style-name="T12">Toolbar</text:span></text:p></draw:text-box></draw:frame><draw:frame text:anchor-type="paragraph" draw:z-index="66" draw:name="Text Frame 20" draw:style-name="gr9" draw:text-style-name="P19" svg:width="2.5559in" svg:height="0.8634in" svg:x="2.6516in" svg:y="1.0047in"><draw:text-box><text:p><text:span text:style-name="T12">Toggle toolbar button</text:span></text:p></draw:text-box></draw:frame><draw:line text:anchor-type="paragraph" draw:z-index="22" draw:name="Line 15" draw:style-name="gr2" draw:text-style-name="P6" svg:x1="1.3008in" svg:y1="1.263in" svg:x2="1.3008in" svg:y2="0.7783in"><text:p/></draw:line><draw:line text:anchor-type="paragraph" draw:z-index="21" draw:name="Line 12" draw:style-name="gr2" draw:text-style-name="P6" svg:x1="5.9126in" svg:y1="2.1543in" svg:x2="4.8319in" svg:y2="2.1543in"><text:p/></draw:line><draw:custom-shape text:anchor-type="paragraph" draw:z-index="20" draw:name="Shape 28" draw:style-name="gr10" draw:text-style-name="P7" svg:width="1.2634in" svg:height="1.6469in" svg:x="0.7154in" svg:y="1.2634in"><text:p/><draw:enhanced-geometry svg:viewBox="0 0 21600 21600" draw:type="rectangle" draw:enhanced-path="M 0 0 L 21600 0 21600 21600 0 21600 0 0 Z N"/></draw:custom-shape><draw:custom-shape text:anchor-type="paragraph" draw:z-index="5" draw:name="Shape 3" draw:style-name="gr11" draw:text-style-name="P7" svg:width="0.7921in" svg:height="1.9248in" svg:x="5.9126in" svg:y="0.429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 2" draw:style-name="gr12" draw:text-style-name="P20" svg:width="0.7689in" svg:height="0.6362in" svg:x="3.2028in" svg:y="0.038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" draw:name="Line 1" draw:style-name="gr2" draw:text-style-name="P6" svg:x1="3.5819in" svg:y1="0.6744in" svg:x2="3.5717in" svg:y2="1.0051in"><text:p/></draw:line><draw:frame draw:style-name="fr2" draw:name="Image23" text:anchor-type="char" svg:x="0.8118in" svg:y="1.3327in" svg:width="1.0543in" svg:height="1.5201in" draw:z-index="19"><draw:image xlink:href="Pictures/1000000100000102000001747001CAA7.png" xlink:type="simple" xlink:show="embed" xlink:actuate="onLoad" draw:mime-type="image/png"/></draw:frame><draw:frame draw:style-name="fr1" draw:name="Image2" text:anchor-type="char" svg:y="0.1602in" svg:width="5.9846in" svg:height="2.9008in" draw:z-index="3"><draw:image xlink:href="Pictures/100000010000077F000003B55CD38D7E.png" xlink:type="simple" xlink:show="embed" xlink:actuate="onLoad" draw:mime-type="image/png"/></draw:frame><text:tab/><text:tab/><text:tab/><text:tab/><text:tab/><text:tab/></text:p>
      <text:p text:style-name="P21">When a tag is selected, the inspector will appear. Here you can edit text, change tag modes, load audio from file, record audio, and delete the tag.</text:p>
      <text:p text:style-name="P14"/>
      <text:p text:style-name="P22"><draw:custom-shape text:anchor-type="paragraph" draw:z-index="15" draw:name="Shape 25" draw:style-name="gr13" draw:text-style-name="P11" svg:width="2.5925in" svg:height="0.5677in" svg:x="2.3374in" svg:y="0in"><text:p text:style-name="P10"><text:span text:style-name="T6">- Page Control -</text:span></text:p><draw:enhanced-geometry svg:viewBox="0 0 21600 21600" draw:type="rectangle" draw:enhanced-path="M 0 0 L 21600 0 21600 21600 0 21600 0 0 Z N"/></draw:custom-shape><text:soft-page-break/></text:p>
      <text:p text:style-name="P22"><draw:custom-shape text:anchor-type="paragraph" draw:z-index="62" draw:name="Shape 7" draw:style-name="gr1" draw:text-style-name="P4" svg:width="0.2953in" svg:height="11.7524in" svg:x="-0.4945in" svg:y="1.1083in"><text:p/><draw:enhanced-geometry svg:viewBox="0 0 21600 21600" draw:type="rectangle" draw:enhanced-path="M 0 0 L 21600 0 21600 21600 0 21600 0 0 Z N"/></draw:custom-shape></text:p>
      <text:p text:style-name="P23"/>
      <text:p text:style-name="P23"><draw:frame text:anchor-type="paragraph" draw:z-index="32" draw:name="Text Frame 7" draw:style-name="gr14" draw:text-style-name="P25" svg:width="0.3406in" svg:height="0.4307in" svg:x="6.3146in" svg:y="0.2339in"><draw:text-box><text:p text:style-name="P24"><text:span text:style-name="T13">1.</text:span></text:p></draw:text-box></draw:frame><text:span text:style-name="T14">1.</text:span><text:span text:style-name="T15"> </text:span><text:span text:style-name="T16">T</text:span><text:span text:style-name="T17">he p</text:span><text:span text:style-name="T10">age indicator dis</text:span><draw:frame draw:style-name="fr3" draw:name="Image20" text:anchor-type="char" svg:y="0.0846in" svg:width="2.3283in" svg:height="4.6701in" draw:z-index="6"><draw:image xlink:href="Pictures/10000001000000B50000016BCD0CA8A6.png" xlink:type="simple" xlink:show="embed" xlink:actuate="onLoad" draw:mime-type="image/png"/></draw:frame><text:span text:style-name="T10">plays the current <text:tab/> page out of the total. </text:span></text:p>
      <text:p text:style-name="P23"/>
      <text:p text:style-name="P23"><text:span text:style-name="T14">2.</text:span><text:span text:style-name="T15"> </text:span><text:span text:style-name="T10">add a new </text:span><text:span text:style-name="T3">blank </text:span><text:span text:style-name="T10">page (up to </text:span><text:span text:style-name="T18">3</text:span><text:span text:style-name="T10">0 </text:span><text:span text:style-name="T19">per album</text:span><text:span text:style-name="T20">)</text:span><text:span text:style-name="T19">.</text:span></text:p>
      <text:p text:style-name="P23"><draw:frame text:anchor-type="paragraph" draw:z-index="26" draw:name="Text Frame 1" draw:style-name="gr14" draw:text-style-name="P25" svg:width="0.3406in" svg:height="0.4307in" svg:x="5.3252in" svg:y="0.0402in"><draw:text-box><text:p text:style-name="P24"><text:span text:style-name="T13">2.</text:span></text:p></draw:text-box></draw:frame></text:p>
      <text:p text:style-name="P23"><draw:frame text:anchor-type="paragraph" draw:z-index="27" draw:name="Text Frame 2" draw:style-name="gr14" draw:text-style-name="P25" svg:width="0.3406in" svg:height="0.4307in" svg:x="5.3146in" svg:y="0.3154in"><draw:text-box><text:p text:style-name="P24"><text:span text:style-name="T13">3.</text:span></text:p></draw:text-box></draw:frame><text:span text:style-name="T14">3.</text:span><text:span text:style-name="T15"> &amp; </text:span><text:span text:style-name="T14">4.</text:span><text:span text:style-name="T15"> </text:span><text:span text:style-name="T17">The </text:span><text:span text:style-name="T10">Next and </text:span><text:span text:style-name="T17">P</text:span><text:span text:style-name="T10">rev</text:span><text:span text:style-name="T21">ious</text:span><text:span text:style-name="T10"> buttons cycle through the pages that you have created. </text:span><text:span text:style-name="T22">*Thumbnails</text:span></text:p>
      <text:p text:style-name="P23"><draw:frame text:anchor-type="paragraph" draw:z-index="28" draw:name="Text Frame 3" draw:style-name="gr14" draw:text-style-name="P25" svg:width="0.3406in" svg:height="0.4307in" svg:x="5.3146in" svg:y="0.0047in"><draw:text-box><text:p text:style-name="P24"><text:span text:style-name="T13">4.</text:span></text:p></draw:text-box></draw:frame></text:p>
      <text:p text:style-name="P23"><draw:frame text:anchor-type="paragraph" draw:z-index="29" draw:name="Text Frame 4" draw:style-name="gr14" draw:text-style-name="P25" svg:width="0.3406in" svg:height="0.4307in" svg:x="5.3354in" svg:y="0.3047in"><draw:text-box><text:p text:style-name="P24"><text:span text:style-name="T13">5.</text:span></text:p></draw:text-box></draw:frame><text:span text:style-name="T14">5.</text:span><text:span text:style-name="T15"> </text:span>‘<text:span text:style-name="T10">Copy’ will duplicate the currently selected page.</text:span></text:p>
      <text:p text:style-name="P23"/>
      <text:p text:style-name="P26"><draw:frame text:anchor-type="paragraph" draw:z-index="30" draw:name="Text Frame 5" draw:style-name="gr14" draw:text-style-name="P25" svg:width="0.3406in" svg:height="0.4307in" svg:x="5.3457in" svg:y="0.0256in"><draw:text-box><text:p text:style-name="P24"><text:span text:style-name="T13">6.</text:span></text:p></draw:text-box></draw:frame><text:span text:style-name="T14">6.</text:span><text:span text:style-name="T15"> </text:span><text:span text:style-name="T16">Clear removes </text:span><text:span text:style-name="T1">audio clips and tags</text:span><text:span text:style-name="T16"> from the page </text:span><text:span text:style-name="T1">with the image persisting</text:span><text:span text:style-name="T16">.</text:span></text:p>
      <text:p text:style-name="P27"><draw:frame text:anchor-type="paragraph" draw:z-index="31" draw:name="Text Frame 6" draw:style-name="gr14" draw:text-style-name="P25" svg:width="0.3406in" svg:height="0.4307in" svg:x="5.3457in" svg:y="0.0319in"><draw:text-box><text:p text:style-name="P24"><text:span text:style-name="T13">7.</text:span></text:p></draw:text-box></draw:frame></text:p>
      <text:p text:style-name="P27"><text:span text:style-name="T14">7.</text:span><text:span text:style-name="T15"> </text:span>Delete removes the page entirely.</text:p>
      <text:p text:style-name="P23"/>
      <text:p text:style-name="P28">These options are your page management.</text:p>
      <text:p text:style-name="P28"/>
      <text:p text:style-name="P28">You can also cycle through pages by clicking / touching the <text:span text:style-name="T22">*T</text:span>humbnails at the bottom of the screen.</text:p>
      <text:p text:style-name="P23"><draw:line text:anchor-type="paragraph" draw:z-index="8" draw:name="Line 11" draw:style-name="gr2" draw:text-style-name="P6" svg:x1="1.3791in" svg:y1="1.972in" svg:x2="1.5165in" svg:y2="0.0256in"><text:p/></draw:line></text:p>
      <text:p text:style-name="P23"><draw:frame draw:style-name="fr4" draw:name="Image21 Copy 1" text:anchor-type="char" svg:x="0in" svg:y="0.5717in" svg:width="6.9634in" svg:height="2.0756in" draw:z-index="7"><draw:image xlink:href="Pictures/100000010000077F000003B3824176E5.png" xlink:type="simple" xlink:show="embed" xlink:actuate="onLoad" draw:mime-type="image/png"/></draw:frame></text:p>
      <text:p text:style-name="P23"><draw:custom-shape text:anchor-type="paragraph" draw:z-index="9" draw:name="Shape 22" draw:style-name="gr15" draw:text-style-name="P20" svg:width="6.9449in" svg:height="0.8752in" svg:x="-0.248in" svg:y="1.55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3"/>
      <text:p text:style-name="P29"><draw:custom-shape text:anchor-type="paragraph" draw:z-index="16" draw:name="Shape 26" draw:style-name="gr13" draw:text-style-name="P4" svg:width="2.5925in" svg:height="0.5677in" svg:x="2.3492in" svg:y="0in"><text:p text:style-name="P6"><text:span text:style-name="T23">- Add to Page -</text:span></text:p><draw:enhanced-geometry svg:viewBox="0 0 21600 21600" draw:type="rectangle" draw:enhanced-path="M 0 0 L 21600 0 21600 21600 0 21600 0 0 Z N"/></draw:custom-shape><draw:custom-shape text:anchor-type="paragraph" draw:z-index="61" draw:name="Shape 6" draw:style-name="gr1" draw:text-style-name="P4" svg:width="0.2953in" svg:height="11.7524in" svg:x="-0.4945in" svg:y="1.1083in"><text:p/><draw:enhanced-geometry svg:viewBox="0 0 21600 21600" draw:type="rectangle" draw:enhanced-path="M 0 0 L 21600 0 21600 21600 0 21600 0 0 Z N"/></draw:custom-shape><text:soft-page-break/></text:p>
      <text:p text:style-name="P23"><text:tab/></text:p>
      <text:p text:style-name="P23"><draw:frame draw:style-name="fr2" draw:name="Image22" text:anchor-type="char" svg:x="4.9417in" svg:y="0.0957in" svg:width="2.3264in" svg:height="3.5866in" draw:z-index="14"><draw:image xlink:href="Pictures/10000001000000B50000011728B12A25.png" xlink:type="simple" xlink:show="embed" xlink:actuate="onLoad" draw:mime-type="image/png"/></draw:frame></text:p>
      <text:p text:style-name="P30"><draw:frame text:anchor-type="paragraph" draw:z-index="33" draw:name="Text Frame 8" draw:style-name="gr14" draw:text-style-name="P25" svg:width="0.3406in" svg:height="0.4307in" svg:x="5.3146in" svg:y="0.3764in"><draw:text-box><text:p text:style-name="P24"><text:span text:style-name="T13">1.</text:span></text:p></draw:text-box></draw:frame><text:span text:style-name="T24">1.</text:span><text:span text:style-name="T25"> </text:span>Click ‘Image’ to<text:span text:style-name="T26"> locate the image </text:span>on your device <text:span text:style-name="T26">that you would like to display. </text:span><text:span text:style-name="T18">Select the image and click ‘OK’ to the message.</text:span></text:p>
      <text:p text:style-name="P23"><draw:frame text:anchor-type="paragraph" draw:z-index="34" draw:name="Text Frame 9" draw:style-name="gr14" draw:text-style-name="P25" svg:width="0.3406in" svg:height="0.4307in" svg:x="5.3146in" svg:y="0.1429in"><draw:text-box><text:p text:style-name="P24"><text:span text:style-name="T13">2.</text:span></text:p></draw:text-box></draw:frame></text:p>
      <text:p text:style-name="P30"><draw:frame text:anchor-type="paragraph" draw:z-index="35" draw:name="Text Frame 10" draw:style-name="gr14" draw:text-style-name="P25" svg:width="0.3406in" svg:height="0.4307in" svg:x="5.3146in" svg:y="0.4327in"><draw:text-box><text:p text:style-name="P24"><text:span text:style-name="T13">3.</text:span></text:p></draw:text-box></draw:frame><text:span text:style-name="T24">2.</text:span><text:span text:style-name="T25"> </text:span>Click ‘Frames’ to <text:span text:style-name="T18">load</text:span> up to 5 images that act similar to a .gif <text:span text:style-name="T25">(quickly cycle through the images)</text:span></text:p>
      <text:p text:style-name="P23"><draw:frame text:anchor-type="paragraph" draw:z-index="36" draw:name="Text Frame 11" draw:style-name="gr14" draw:text-style-name="P25" svg:width="0.3406in" svg:height="0.4307in" svg:x="5.3146in" svg:y="0.1709in"><draw:text-box><text:p text:style-name="P24"><text:span text:style-name="T13">4.</text:span></text:p></draw:text-box></draw:frame></text:p>
      <text:p text:style-name="P30"><draw:frame text:anchor-type="paragraph" draw:z-index="37" draw:name="Text Frame 12" draw:style-name="gr14" draw:text-style-name="P25" svg:width="0.3406in" svg:height="0.4307in" svg:x="5.3146in" svg:y="0.4236in"><draw:text-box><text:p text:style-name="P24"><text:span text:style-name="T13">5.</text:span></text:p></draw:text-box></draw:frame><text:span text:style-name="T24">3.</text:span><text:span text:style-name="T25"> </text:span>To load an audio clip from <text:span text:style-name="T18">your device</text:span>, click ‘Audio’. <text:s/>*Max clip sized is 500kb.</text:p>
      <text:p text:style-name="P23"/>
      <text:p text:style-name="P30"><text:span text:style-name="T24">4.</text:span><text:span text:style-name="T25"> </text:span>To directly record audio from your device’s microphone, click ‘Record’. *Max clip sized is 500kb. A red dot will appear <text:span text:style-name="T18">in the center of the screen </text:span>when recording, and the device will capture audio for up to 6 seconds. Clicking the red dot will stop the recording.</text:p>
      <text:p text:style-name="P23"/>
      <text:p text:style-name="P31"><text:span text:style-name="T27">5.</text:span> enable / disable draw mode. <text:span text:style-name="T28">If enabled, tags on the selected page will be ignored and a gray image will appear over the page image. Users can draw / scratch to reveal the colour image underneath. </text:span></text:p>
      <text:p text:style-name="P23"/>
      <text:p text:style-name="P23"/>
      <text:p text:style-name="P23"/>
      <text:p text:style-name="P23"><draw:custom-shape text:anchor-type="paragraph" draw:z-index="0" draw:name="Shape 9" draw:style-name="gr16" draw:text-style-name="P32" svg:width="3.4276in" svg:height="2.9067in" svg:x="1.1547in" svg:y="0.2783in"><text:p/><draw:enhanced-geometry svg:viewBox="0 0 21600 21600" draw:type="rectangle" draw:enhanced-path="M 0 0 L 21600 0 21600 21600 0 21600 0 0 Z N"/></draw:custom-shape></text:p>
      <text:p text:style-name="P23"><draw:frame text:anchor-type="paragraph" draw:z-index="71" draw:name="Text Frame 23" draw:style-name="gr9" draw:text-style-name="P18" svg:width="2.5606in" svg:height="0.8634in" svg:x="4.6783in" svg:y="0.1752in"><draw:text-box><text:p><text:span text:style-name="T11">Page audio indicator</text:span></text:p><text:p><text:span text:style-name="T11">Click to play the clip</text:span></text:p></draw:text-box></draw:frame><draw:frame text:anchor-type="paragraph" draw:z-index="70" draw:name="Text Frame 19" draw:style-name="gr17" draw:text-style-name="P18" svg:width="1.3787in" svg:height="0.6043in" svg:x="1.5402in" svg:y="0.1783in"><draw:text-box><text:p><text:span text:style-name="T11">Draw Mode indicator</text:span></text:p></draw:text-box></draw:frame><draw:custom-shape text:anchor-type="paragraph" draw:z-index="73" draw:name="Shape 16" draw:style-name="gr18" draw:text-style-name="P32" svg:width="0.615in" svg:height="2.8906in" svg:x="0.8008in" svg:y="0.0071in"><text:p/><draw:enhanced-geometry svg:viewBox="0 0 21600 21600" draw:type="rectangle" draw:enhanced-path="M 0 0 L 21600 0 21600 21600 0 21600 0 0 Z N"/></draw:custom-shape><draw:frame draw:style-name="fr5" draw:name="Image24 Copy 1" text:anchor-type="char" svg:x="2.7453in" svg:y="0.0984in" svg:width="1.798in" svg:height="1.6319in" draw:z-index="69"><draw:image xlink:href="Pictures/100000010000007D00000078B8CBA589.png" xlink:type="simple" xlink:show="embed" xlink:actuate="onLoad" draw:mime-type="image/png"/></draw:frame></text:p>
      <text:p text:style-name="P23"/>
      <text:p text:style-name="P23"/>
      <text:p text:style-name="P23"><draw:frame text:anchor-type="paragraph" draw:z-index="72" draw:name="Text Frame 24" draw:style-name="gr9" draw:text-style-name="P18" svg:width="2.6315in" svg:height="0.8634in" svg:x="4.6783in" svg:y="0.0772in"><draw:text-box><text:p><text:span text:style-name="T11">Page frames indicator</text:span></text:p><text:p><text:span text:style-name="T11">Click to play the frames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><draw:custom-shape text:anchor-type="paragraph" draw:z-index="74" draw:name="Shape 18" draw:style-name="gr19" draw:text-style-name="P32" svg:width="3.3335in" svg:height="0.2098in" svg:x="1.2484in" svg:y="0.2252in"><text:p/><draw:enhanced-geometry svg:viewBox="0 0 21600 21600" draw:type="rectangle" draw:enhanced-path="M 0 0 L 21600 0 21600 21600 0 21600 0 0 Z N"/></draw:custom-shape></text:p>
      <text:p text:style-name="P23"><draw:custom-shape text:anchor-type="paragraph" draw:z-index="39" draw:name="Shape 30" draw:style-name="gr5" draw:text-style-name="P4" svg:width="2.5925in" svg:height="0.5677in" svg:x="2.3374in" svg:y="0in"><text:p text:style-name="P6"><text:span text:style-name="T23">- Tags -</text:span></text:p><draw:enhanced-geometry svg:viewBox="0 0 21600 21600" draw:type="rectangle" draw:enhanced-path="M 0 0 L 21600 0 21600 21600 0 21600 0 0 Z N"/></draw:custom-shape><text:soft-page-break/></text:p>
      <text:p text:style-name="P23"/>
      <text:p text:style-name="P23"><draw:frame draw:style-name="fr2" draw:name="Image25" text:anchor-type="char" svg:x="4.852in" svg:y="0.198in" svg:width="2.4957in" svg:height="4.1244in" draw:z-index="38"><draw:image xlink:href="Pictures/10000001000000B50000012B818D5727.png" xlink:type="simple" xlink:show="embed" xlink:actuate="onLoad" draw:mime-type="image/png"/></draw:frame></text:p>
      <text:p text:style-name="P33"><draw:frame text:anchor-type="paragraph" draw:z-index="40" draw:name="Text Frame 13" draw:style-name="gr14" draw:text-style-name="P25" svg:width="0.3406in" svg:height="0.4307in" svg:x="5.2728in" svg:y="0.498in"><draw:text-box><text:p text:style-name="P24"><text:span text:style-name="T13">1.</text:span></text:p></draw:text-box></draw:frame><draw:frame text:anchor-type="paragraph" draw:z-index="41" draw:name="Text Frame 14" draw:style-name="gr14" draw:text-style-name="P25" svg:width="0.3406in" svg:height="0.4307in" svg:x="5.2626in" svg:y="1.1575in"><draw:text-box><text:p text:style-name="P24"><text:span text:style-name="T13">2.</text:span></text:p></draw:text-box></draw:frame><text:span text:style-name="T27">1.</text:span> To add tags to the page (image), click ‘+ Add’ and then click on the image. <text:span text:style-name="T29">After placing the tag, edit mode will be activated to allow editing. </text:span><text:s/></text:p>
      <text:p text:style-name="P23"/>
      <text:p text:style-name="P33"><text:span text:style-name="T27">2.</text:span> ‘Edit’ is selected by default. This allows you to move tags around and resize them. </text:p>
      <text:p text:style-name="P23"><draw:frame text:anchor-type="paragraph" draw:z-index="42" draw:name="Text Frame 15" draw:style-name="gr14" draw:text-style-name="P25" svg:width="0.3406in" svg:height="0.4307in" svg:x="5.2583in" svg:y="0.0335in"><draw:text-box><text:p text:style-name="P24"><text:span text:style-name="T13">3.</text:span></text:p></draw:text-box></draw:frame></text:p>
      <text:p text:style-name="P33"><text:span text:style-name="T27">3.</text:span> You can change the type of tag for each page.</text:p>
      <text:p text:style-name="P33">Hidden – tags are not visible on screen.</text:p>
      <text:p text:style-name="P33">Hint – thin box around tags.</text:p>
      <text:p text:style-name="P33">Visible – tags can be seen.</text:p>
      <text:p text:style-name="P33">Answer – Only the ‘correct’ tag will be visible. </text:p>
      <text:p text:style-name="P23"/>
      <text:p text:style-name="P33">All tags on a page are clickable unless Draw mode has been activated.</text:p>
      <text:p text:style-name="P23"><draw:frame draw:style-name="fr2" draw:name="Image11" text:anchor-type="char" svg:x="5.639in" svg:y="0.0799in" svg:width="1.6661in" svg:height="1.6783in" draw:z-index="75"><draw:image xlink:href="Pictures/100000010000010D0000010FF7948B90.png" xlink:type="simple" xlink:show="embed" xlink:actuate="onLoad" draw:mime-type="image/png"/></draw:frame></text:p>
      <text:p text:style-name="P34"><text:span text:style-name="T30">Tags can be moved by clicking / touching them and moving them around the image. They can also be resized using the </text:span><text:span text:style-name="T31">bottom-right </text:span><text:span text:style-name="T30">yellow square.</text:span></text:p>
      <text:p text:style-name="P35"/>
      <text:p text:style-name="P35"/>
      <text:p text:style-name="P36"><draw:custom-shape text:anchor-type="paragraph" draw:z-index="57" draw:name="Shape 4" draw:style-name="gr20" draw:text-style-name="P38" svg:width="2.5933in" svg:height="0.5685in" svg:x="2.3374in" svg:y="-0.0362in"><text:p text:style-name="P37"><text:span text:style-name="T23">- Tag Inspector -</text:span></text:p><draw:enhanced-geometry svg:viewBox="0 0 21600 21600" draw:type="rectangle" draw:enhanced-path="M 0 0 L 21600 0 21600 21600 0 21600 0 0 Z N"/></draw:custom-shape><draw:custom-shape text:anchor-type="paragraph" draw:z-index="60" draw:name="Shape 5" draw:style-name="gr1" draw:text-style-name="P4" svg:width="0.2953in" svg:height="11.7524in" svg:x="-0.4945in" svg:y="1.1083in"><text:p text:style-name="P6"><text:span text:style-name="T23"/></text:p><draw:enhanced-geometry svg:viewBox="0 0 21600 21600" draw:type="rectangle" draw:enhanced-path="M 0 0 L 21600 0 21600 21600 0 21600 0 0 Z N"/></draw:custom-shape></text:p>
      <text:p text:style-name="P39"><draw:frame draw:style-name="fr2" draw:name="Image3" text:anchor-type="char" svg:x="0.0457in" svg:y="0.1138in" svg:width="2.2925in" svg:height="3.3055in" draw:z-index="58"><draw:image xlink:href="Pictures/1000000100000102000001747001CAA7.png" xlink:type="simple" xlink:show="embed" xlink:actuate="onLoad" draw:mime-type="image/png"/></draw:frame></text:p>
      <text:p text:style-name="P39"><draw:frame text:anchor-type="paragraph" draw:z-index="76" draw:name="Text Frame 25" draw:style-name="gr21" draw:text-style-name="P41" svg:width="4.8134in" svg:height="2.876in" svg:x="2.4402in" svg:y="0.1646in"><draw:text-box><text:p text:style-name="P40"><text:span text:style-name="T32">When selecting a tag, the tag inspector will <text:s/>appear.</text:span></text:p><text:p text:style-name="P40"><text:span text:style-name="T32">This will allow you to add text, select modes, add or record audio clips, or delete the tag. </text:span></text:p><text:p text:style-name="P40"><text:span text:style-name="T32"/></text:p><text:p text:style-name="P40"><text:span text:style-name="T32">The three modes are ‘normal’ (blue), ‘correct’ (green), and ‘incorrect’ (red).</text:span></text:p><text:p text:style-name="P40"><text:span text:style-name="T32"/></text:p><text:p text:style-name="P40"><text:span text:style-name="T32">Audio clips should not be larger than 500kb or else they will not be loaded. </text:span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6"><draw:custom-shape text:anchor-type="paragraph" draw:z-index="43" draw:name="Shape 31" draw:style-name="gr22" draw:text-style-name="P4" svg:width="2.5925in" svg:height="0.5677in" svg:x="2.3374in" svg:y="0.0264in"><text:p text:style-name="P6"><text:span text:style-name="T23">- Album -</text:span></text:p><draw:enhanced-geometry svg:viewBox="0 0 21600 21600" draw:type="rectangle" draw:enhanced-path="M 0 0 L 21600 0 21600 21600 0 21600 0 0 Z N"/></draw:custom-shape><draw:custom-shape text:anchor-type="paragraph" draw:z-index="77" draw:name="Shape 11" draw:style-name="gr1" draw:text-style-name="P4" svg:width="0.2953in" svg:height="11.7524in" svg:x="-0.4945in" svg:y="1.1083in"><text:p/><draw:enhanced-geometry svg:viewBox="0 0 21600 21600" draw:type="rectangle" draw:enhanced-path="M 0 0 L 21600 0 21600 21600 0 21600 0 0 Z N"/></draw:custom-shape><text:soft-page-break/></text:p>
      <text:p text:style-name="P23"/>
      <text:p text:style-name="P23"><draw:frame draw:style-name="fr2" draw:name="Image26" text:anchor-type="char" svg:x="4.9717in" svg:y="0.2846in" svg:width="2.3138in" svg:height="2.5957in" draw:z-index="44"><draw:image xlink:href="Pictures/10000001000000BD000000D424CDF8D9.png" xlink:type="simple" xlink:show="embed" xlink:actuate="onLoad" draw:mime-type="image/png"/></draw:frame></text:p>
      <text:p text:style-name="P43"><draw:frame text:anchor-type="paragraph" draw:z-index="45" draw:name="Text Frame 16" draw:style-name="gr14" draw:text-style-name="P25" svg:width="0.3406in" svg:height="0.4307in" svg:x="5.3043in" svg:y="0.628in"><draw:text-box><text:p text:style-name="P24"><text:span text:style-name="T13">1.</text:span></text:p></draw:text-box></draw:frame>So now we need to talk about albums…</text:p>
      <text:p text:style-name="P23"/>
      <text:p text:style-name="P43"><text:span text:style-name="T33">1.</text:span><text:span text:style-name="T34"> </text:span>To <text:span text:style-name="T35">enter the album selection scene,</text:span> click ‘Albums’.</text:p>
      <text:p text:style-name="P23"/>
      <text:p text:style-name="P44">This will open the album control window.</text:p>
      <text:p text:style-name="P45"/>
      <text:p text:style-name="P44">To create a new album, click ‘Add Album’.</text:p>
      <text:p text:style-name="P23"><draw:custom-shape text:anchor-type="paragraph" draw:z-index="47" draw:name="Shape 17" draw:style-name="gr23" draw:text-style-name="P7" svg:width="0.9276in" svg:height="0.4689in" svg:x="3.1654in" svg:y="0.2492in"><text:p/><draw:enhanced-geometry svg:viewBox="0 0 21600 21600" draw:mirror-horizontal="false" draw:mirror-vertical="false" draw:type="rectangle" draw:enhanced-path="M 0 0 L 21600 0 21600 21600 0 21600 0 0 Z N"/></draw:custom-shape></text:p>
      <text:p text:style-name="P23"><draw:frame draw:style-name="fr6" draw:name="Image15" text:anchor-type="char" svg:width="6.9252in" svg:height="3.3992in" draw:z-index="46"><draw:image xlink:href="Pictures/100000010000077F000003AE54BF6972.png" xlink:type="simple" xlink:show="embed" xlink:actuate="onLoad" draw:mime-type="image/png"/></draw:frame></text:p>
      <text:p text:style-name="P46">You will be prompted to name the new album. Click ‘OK’ when done.</text:p>
      <text:p text:style-name="P23"><draw:frame draw:style-name="fr2" draw:name="Image17" text:anchor-type="char" svg:x="1.6055in" svg:y="0.0457in" svg:width="3.8398in" svg:height="1.5752in" draw:z-index="48"><draw:image xlink:href="Pictures/1000000100000249000000F01D64C61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7"><text:soft-page-break/>Select an album <text:span text:style-name="T36">and an options </text:span><text:span text:style-name="T37">menu</text:span><text:span text:style-name="T36"> will appear. You can open (enter </text:span>‘Editor’ mode<text:span text:style-name="T36">)</text:span>, rename, delete, or close the <text:span text:style-name="T38">current </text:span><text:span text:style-name="T37">menu</text:span>.</text:p>
      <text:p text:style-name="P46"/>
      <text:p text:style-name="P45"><draw:custom-shape text:anchor-type="paragraph" draw:z-index="78" draw:name="Shape 12" draw:style-name="gr1" draw:text-style-name="P4" svg:width="0.2953in" svg:height="11.7524in" svg:x="-0.4945in" svg:y="1.1083in"><text:p/><draw:enhanced-geometry svg:viewBox="0 0 21600 21600" draw:type="rectangle" draw:enhanced-path="M 0 0 L 21600 0 21600 21600 0 21600 0 0 Z N"/></draw:custom-shape><draw:frame draw:style-name="fr6" draw:name="Image18" text:anchor-type="char" svg:width="5.3417in" svg:height="2.2835in" draw:z-index="49"><draw:image xlink:href="Pictures/10000001000002B200000127D1A49513.png" xlink:type="simple" xlink:show="embed" xlink:actuate="onLoad" draw:mime-type="image/png"/></draw:frame></text:p>
      <text:p text:style-name="P45"/>
      <text:p text:style-name="P45"><draw:line text:anchor-type="paragraph" draw:z-index="52" draw:name="Line 5" draw:style-name="gr2" draw:text-style-name="P6" svg:x1="1.6362in" svg:y1="0.0909in" svg:x2="0.2819in" svg:y2="0.1035in"><text:p/></draw:line></text:p>
      <text:p text:style-name="P45"><draw:line text:anchor-type="paragraph" draw:z-index="50" draw:name="Line 3" draw:style-name="gr2" draw:text-style-name="P6" svg:x1="1.6469in" svg:y1="0.202in" svg:x2="0.2925in" svg:y2="0.2146in"><text:p/></draw:line></text:p>
      <text:p text:style-name="P45"/>
      <text:p text:style-name="P45"><draw:line text:anchor-type="paragraph" draw:z-index="51" draw:name="Line 4" draw:style-name="gr2" draw:text-style-name="P6" svg:x1="1.6469in" svg:y1="0.0008in" svg:x2="0.2925in" svg:y2="0.0134in"><text:p/></draw:line><draw:line text:anchor-type="paragraph" draw:z-index="53" draw:name="Line 6" draw:style-name="gr2" draw:text-style-name="P6" svg:x1="1.6154in" svg:y1="0.4071in" svg:x2="0.261in" svg:y2="0.4197in"><text:p/></draw:line></text:p>
      <text:p text:style-name="P45"/>
      <text:p text:style-name="P45"/>
      <text:p text:style-name="P44">You can have as an unlimited amount of albums, but each albu<text:span text:style-name="T36">m</text:span> has a maximum of <text:span text:style-name="T39">3</text:span>0 pages.</text:p>
      <text:p text:style-name="P23"/>
      <text:p text:style-name="P44">Important note! – Clearing your browser cache and history will remove all albums. So saving is very important. If you have saved your albums, and do clear <text:span text:style-name="T40">the </text:span>cache <text:span text:style-name="T40">or app data</text:span>, you can load them at any time.</text:p>
      <text:p text:style-name="P44"><text:line-break/>Also, you can share them with family, friends, and students.</text:p>
      <text:p text:style-name="P23"/>
      <text:p text:style-name="P23"><draw:frame draw:style-name="fr2" draw:name="Image26 Copy 1" text:anchor-type="char" svg:x="5.0236in" svg:y="0.0835in" svg:width="2.3138in" svg:height="2.5957in" draw:z-index="54"><draw:image xlink:href="Pictures/10000001000000BD000000D424CDF8D9.png" xlink:type="simple" xlink:show="embed" xlink:actuate="onLoad" draw:mime-type="image/png"/></draw:frame></text:p>
      <text:p text:style-name="P48"><draw:frame text:anchor-type="paragraph" draw:z-index="55" draw:name="Text Frame 17" draw:style-name="gr14" draw:text-style-name="P25" svg:width="0.3406in" svg:height="0.4307in" svg:x="5.398in" svg:y="0.852in"><draw:text-box><text:p text:style-name="P24"><text:span text:style-name="T13">2.</text:span></text:p></draw:text-box></draw:frame><text:span text:style-name="T41">2.</text:span><text:span text:style-name="T42"> </text:span>To load an album, create an empty album and the click ‘Load’. This ensures your current album is not <text:span text:style-name="T43">overwritten</text:span>. </text:p>
      <text:p text:style-name="P49"/>
      <text:p text:style-name="P49"><draw:frame text:anchor-type="paragraph" draw:z-index="56" draw:name="Text Frame 18" draw:style-name="gr14" draw:text-style-name="P25" svg:width="0.3406in" svg:height="0.4307in" svg:x="5.3874in" svg:y="0.2827in"><draw:text-box><text:p text:style-name="P24"><text:span text:style-name="T13">3.</text:span></text:p></draw:text-box></draw:frame><text:span text:style-name="T41">3.</text:span><text:span text:style-name="T42"> </text:span><text:span text:style-name="T35">Click ‘Save’ to save the current album to your device as a .zip file. It will show as the album name you created. Eg. Test.zip</text:span></text:p>
      <text:p text:style-name="P50"/>
      <text:p text:style-name="P50">After selecting save, an export summary will be shown outlining the number of pages, images, frames, audio clips, and the file size. Select ‘Download’.</text:p>
      <text:p text:style-name="P50"/>
      <text:p text:style-name="P50"/>
      <text:p text:style-name="P50"/>
      <text:p text:style-name="P50"/>
      <text:p text:style-name="P50"/>
      <text:p text:style-name="P51"><text:soft-page-break/><text:span text:style-name="T44">Below</text:span><text:span text:style-name="T45"> is an example of draw / scratch <text:tab/></text:span><text:span text:style-name="T44">during play</text:span>. </text:p>
      <text:p text:style-name="P39"><draw:custom-shape text:anchor-type="paragraph" draw:z-index="65" draw:name="Shape 14" draw:style-name="gr1" draw:text-style-name="P4" svg:width="0.2953in" svg:height="11.7524in" svg:x="-0.4945in" svg:y="1.1083in"><text:p text:style-name="P6"/><draw:enhanced-geometry svg:viewBox="0 0 21600 21600" draw:type="rectangle" draw:enhanced-path="M 0 0 L 21600 0 21600 21600 0 21600 0 0 Z N"/></draw:custom-shape><draw:frame draw:style-name="fr2" draw:name="Image14" text:anchor-type="char" svg:x="1.4528in" svg:y="0.2484in" svg:width="5.7547in" svg:height="2.8402in" draw:z-index="59"><draw:image xlink:href="Pictures/100000010000077F000003B3824176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9T14:38:50.948023100</meta:creation-date>
    <meta:generator>LibreOffice/26.2.3.2$Windows_X86_64 LibreOffice_project/70e089b17412e4cb7773e41413306b17a2328c34</meta:generator>
    <dc:date>2026-06-17T13:32:22.392542100</dc:date>
    <meta:editing-duration>PT5H12M52S</meta:editing-duration>
    <meta:editing-cycles>81</meta:editing-cycles>
    <meta:document-statistic meta:table-count="0" meta:image-count="17" meta:object-count="0" meta:page-count="8" meta:paragraph-count="49" meta:word-count="852" meta:character-count="4654" meta:non-whitespace-character-count="3822"/>
  </office:meta>
</office:document-meta>
</file>